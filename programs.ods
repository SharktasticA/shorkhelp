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7">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8">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0">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number-rows-repeated="104837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 style:data-style-name="N2" text:time-value="20:26:56.5960707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6-30T22:09:44.253901178</dc:date>
    <meta:editing-duration>PT2H27M35S</meta:editing-duration>
    <meta:editing-cycles>24</meta:editing-cycles>
    <meta:document-statistic meta:table-count="1" meta:cell-count="1183" meta:object-count="0"/>
  </office:meta>
</office:document-meta>
</file>